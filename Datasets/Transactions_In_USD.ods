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Airtime top-up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Bulk disbursement</text:p>
          </table:table-cell>
          <table:table-cell office:value-type="string" calcext:value-type="string">
            <text:p>Cash-in</text:p>
          </table:table-cell>
          <table:table-cell office:value-type="string" calcext:value-type="string">
            <text:p>Cash-out</text:p>
          </table:table-cell>
          <table:table-cell office:value-type="string" calcext:value-type="string">
            <text:p>International remittance</text:p>
          </table:table-cell>
          <table:table-cell office:value-type="string" calcext:value-type="string">
            <text:p>Merchant payment</text:p>
          </table:table-cell>
          <table:table-cell office:value-type="string" calcext:value-type="string">
            <text:p>P2P transfer</text:p>
          </table:table-cell>
        </table:table-row>
        <table:table-row table:style-name="ro1">
          <table:table-cell office:value-type="string" calcext:value-type="string">
            <text:p>Northern Africa</text:p>
          </table:table-cell>
          <table:table-cell office:value-type="float" office:value="111347912" calcext:value-type="float">
            <text:p>111347912</text:p>
          </table:table-cell>
          <table:table-cell office:value-type="float" office:value="160953675" calcext:value-type="float">
            <text:p>160953675</text:p>
          </table:table-cell>
          <table:table-cell office:value-type="float" office:value="3333757" calcext:value-type="float">
            <text:p>3333757</text:p>
          </table:table-cell>
          <table:table-cell office:value-type="float" office:value="1526082743" calcext:value-type="float">
            <text:p>1526082743</text:p>
          </table:table-cell>
          <table:table-cell office:value-type="float" office:value="959205511" calcext:value-type="float">
            <text:p>959205511</text:p>
          </table:table-cell>
          <table:table-cell office:value-type="float" office:value="1103342" calcext:value-type="float">
            <text:p>1103342</text:p>
          </table:table-cell>
          <table:table-cell office:value-type="float" office:value="311117024" calcext:value-type="float">
            <text:p>311117024</text:p>
          </table:table-cell>
          <table:table-cell office:value-type="float" office:value="7278491183" calcext:value-type="float">
            <text:p>7278491183</text:p>
          </table:table-cell>
        </table:table-row>
        <table:table-row table:style-name="ro1">
          <table:table-cell office:value-type="string" calcext:value-type="string">
            <text:p>Eastern Africa</text:p>
          </table:table-cell>
          <table:table-cell office:value-type="float" office:value="4247425201" calcext:value-type="float">
            <text:p>4247425201</text:p>
          </table:table-cell>
          <table:table-cell office:value-type="float" office:value="60374210782" calcext:value-type="float">
            <text:p>60374210782</text:p>
          </table:table-cell>
          <table:table-cell office:value-type="float" office:value="59957891032" calcext:value-type="float">
            <text:p>59957891032</text:p>
          </table:table-cell>
          <table:table-cell office:value-type="float" office:value="151462435430" calcext:value-type="float">
            <text:p>151462435430</text:p>
          </table:table-cell>
          <table:table-cell office:value-type="float" office:value="83841650916" calcext:value-type="float">
            <text:p>83841650916</text:p>
          </table:table-cell>
          <table:table-cell office:value-type="float" office:value="9733075892" calcext:value-type="float">
            <text:p>9733075892</text:p>
          </table:table-cell>
          <table:table-cell office:value-type="float" office:value="48326080634" calcext:value-type="float">
            <text:p>48326080634</text:p>
          </table:table-cell>
          <table:table-cell office:value-type="float" office:value="230793170693" calcext:value-type="float">
            <text:p>230793170693</text:p>
          </table:table-cell>
        </table:table-row>
        <table:table-row table:style-name="ro1">
          <table:table-cell office:value-type="string" calcext:value-type="string">
            <text:p>Middle Africa</text:p>
          </table:table-cell>
          <table:table-cell office:value-type="float" office:value="2139854334" calcext:value-type="float">
            <text:p>2139854334</text:p>
          </table:table-cell>
          <table:table-cell office:value-type="float" office:value="1083219883" calcext:value-type="float">
            <text:p>1083219883</text:p>
          </table:table-cell>
          <table:table-cell office:value-type="float" office:value="991575739" calcext:value-type="float">
            <text:p>991575739</text:p>
          </table:table-cell>
          <table:table-cell office:value-type="float" office:value="29538801452" calcext:value-type="float">
            <text:p>29538801452</text:p>
          </table:table-cell>
          <table:table-cell office:value-type="float" office:value="25017168623" calcext:value-type="float">
            <text:p>25017168623</text:p>
          </table:table-cell>
          <table:table-cell office:value-type="float" office:value="1661727104" calcext:value-type="float">
            <text:p>1661727104</text:p>
          </table:table-cell>
          <table:table-cell office:value-type="float" office:value="5423422967" calcext:value-type="float">
            <text:p>5423422967</text:p>
          </table:table-cell>
          <table:table-cell office:value-type="float" office:value="17088573984" calcext:value-type="float">
            <text:p>17088573984</text:p>
          </table:table-cell>
        </table:table-row>
        <table:table-row table:style-name="ro1">
          <table:table-cell office:value-type="string" calcext:value-type="string">
            <text:p>Southern Africa</text:p>
          </table:table-cell>
          <table:table-cell office:value-type="float" office:value="116316047" calcext:value-type="float">
            <text:p>116316047</text:p>
          </table:table-cell>
          <table:table-cell office:value-type="float" office:value="177008755" calcext:value-type="float">
            <text:p>177008755</text:p>
          </table:table-cell>
          <table:table-cell office:value-type="float" office:value="116692333" calcext:value-type="float">
            <text:p>116692333</text:p>
          </table:table-cell>
          <table:table-cell office:value-type="float" office:value="1811089336" calcext:value-type="float">
            <text:p>1811089336</text:p>
          </table:table-cell>
          <table:table-cell office:value-type="float" office:value="1691718062" calcext:value-type="float">
            <text:p>1691718062</text:p>
          </table:table-cell>
          <table:table-cell office:value-type="float" office:value="103845296" calcext:value-type="float">
            <text:p>103845296</text:p>
          </table:table-cell>
          <table:table-cell office:value-type="float" office:value="352938600" calcext:value-type="float">
            <text:p>352938600</text:p>
          </table:table-cell>
          <table:table-cell office:value-type="float" office:value="1920232008" calcext:value-type="float">
            <text:p>1920232008</text:p>
          </table:table-cell>
        </table:table-row>
        <table:table-row table:style-name="ro1">
          <table:table-cell office:value-type="string" calcext:value-type="string">
            <text:p>Western Africa</text:p>
          </table:table-cell>
          <table:table-cell office:value-type="float" office:value="5343598265" calcext:value-type="float">
            <text:p>5343598265</text:p>
          </table:table-cell>
          <table:table-cell office:value-type="float" office:value="3591008942" calcext:value-type="float">
            <text:p>3591008942</text:p>
          </table:table-cell>
          <table:table-cell office:value-type="float" office:value="2775764022" calcext:value-type="float">
            <text:p>2775764022</text:p>
          </table:table-cell>
          <table:table-cell office:value-type="float" office:value="84008344972" calcext:value-type="float">
            <text:p>84008344972</text:p>
          </table:table-cell>
          <table:table-cell office:value-type="float" office:value="99482841202" calcext:value-type="float">
            <text:p>99482841202</text:p>
          </table:table-cell>
          <table:table-cell office:value-type="float" office:value="12252986103" calcext:value-type="float">
            <text:p>12252986103</text:p>
          </table:table-cell>
          <table:table-cell office:value-type="float" office:value="15236370743" calcext:value-type="float">
            <text:p>15236370743</text:p>
          </table:table-cell>
          <table:table-cell office:value-type="float" office:value="134250636327" calcext:value-type="float">
            <text:p>134250636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8T11:43:16.044276759</meta:creation-date>
    <dc:date>2026-05-28T11:45:47.250048488</dc:date>
    <meta:editing-duration>PT2M37S</meta:editing-duration>
    <meta:editing-cycles>1</meta:editing-cycles>
    <meta:document-statistic meta:table-count="1" meta:cell-count="54" meta:object-count="0"/>
    <meta:generator>LibreOffice/7.5.5.2$Linux_X86_64 LibreOffice_project/50$Build-2</meta:generator>
  </office:meta>
</office:document-meta>
</file>